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>
            <text:p>name</text:p>
          </table:table-cell>
          <table:table-cell>
            <text:p>email</text:p>
          </table:table-cell>
          <table:table-cell>
            <text:p>phone</text:p>
          </table:table-cell>
          <table:table-cell>
            <text:p>company</text:p>
          </table:table-cell>
          <table:table-cell>
            <text:p>leadStatus</text:p>
          </table:table-cell>
          <table:table-cell>
            <text:p>leadSource</text:p>
          </table:table-cell>
          <table:table-cell>
            <text:p>notes</text:p>
          </table:table-cell>
        </table:table-row>
        <table:table-row>
          <table:table-cell>
            <text:p>John Doe</text:p>
          </table:table-cell>
          <table:table-cell>
            <text:p>john@example.com</text:p>
          </table:table-cell>
          <table:table-cell>
            <text:p>555-1234</text:p>
          </table:table-cell>
          <table:table-cell>
            <text:p>TechCorp</text:p>
          </table:table-cell>
          <table:table-cell>
            <text:p>Interested</text:p>
          </table:table-cell>
          <table:table-cell>
            <text:p>Website</text:p>
          </table:table-cell>
          <table:table-cell>
            <text:p>Great prospect from blog</text:p>
          </table:table-cell>
        </table:table-row>
        <table:table-row>
          <table:table-cell>
            <text:p>Jane Smith</text:p>
          </table:table-cell>
          <table:table-cell>
            <text:p>jane@example.com</text:p>
          </table:table-cell>
          <table:table-cell>
            <text:p>555-5678</text:p>
          </table:table-cell>
          <table:table-cell>
            <text:p>FinanceInc</text:p>
          </table:table-cell>
          <table:table-cell>
            <text:p>Qualified</text:p>
          </table:table-cell>
          <table:table-cell>
            <text:p>Referral</text:p>
          </table:table-cell>
          <table:table-cell>
            <text:p>Referred by existing client</text:p>
          </table:table-cell>
        </table:table-row>
        <table:table-row>
          <table:table-cell>
            <text:p>Mike Johnson</text:p>
          </table:table-cell>
          <table:table-cell>
            <text:p>mike@example.com</text:p>
          </table:table-cell>
          <table:table-cell>
            <text:p>555-9999</text:p>
          </table:table-cell>
          <table:table-cell>
            <text:p>DataSys</text:p>
          </table:table-cell>
          <table:table-cell>
            <text:p>Contacted</text:p>
          </table:table-cell>
          <table:table-cell>
            <text:p>LinkedIn</text:p>
          </table:table-cell>
          <table:table-cell>
            <text:p>Reached out regarding proposal</text:p>
          </table:table-cell>
        </table:table-row>
        <table:table-row>
          <table:table-cell>
            <text:p>Sarah Williams</text:p>
          </table:table-cell>
          <table:table-cell>
            <text:p>sarah@example.com</text:p>
          </table:table-cell>
          <table:table-cell>
            <text:p>555-4321</text:p>
          </table:table-cell>
          <table:table-cell>
            <text:p>CloudBase</text:p>
          </table:table-cell>
          <table:table-cell>
            <text:p>Negotiating</text:p>
          </table:table-cell>
          <table:table-cell>
            <text:p>Trade Show</text:p>
          </table:table-cell>
          <table:table-cell>
            <text:p>Met at industry conference</text:p>
          </table:table-cell>
        </table:table-row>
        <table:table-row>
          <table:table-cell>
            <text:p>Robert Brown</text:p>
          </table:table-cell>
          <table:table-cell>
            <text:p>robert@example.com</text:p>
          </table:table-cell>
          <table:table-cell>
            <text:p>555-8765</text:p>
          </table:table-cell>
          <table:table-cell>
            <text:p>SecureNet</text:p>
          </table:table-cell>
          <table:table-cell>
            <text:p>Prospect</text:p>
          </table:table-cell>
          <table:table-cell>
            <text:p>Email Campaign</text:p>
          </table:table-cell>
          <table:table-cell>
            <text:p>Opened email campaign link</text:p>
          </table:table-cell>
        </table:table-row>
      </table:table>
    </office:spreadsheet>
  </office:body>
</office:document-content>
</file>